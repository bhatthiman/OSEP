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erminal 1 - Backend</text:h>
      <text:section text:style-name="Sect1" text:name="code-block-viewer">
        <text:p text:style-name="P1"><text:span text:style-name="Source_20_Text">cd ~/projects/OSEP/backend</text:span></text:p>
        <text:p text:style-name="Preformatted_20_Text"><text:span text:style-name="Source_20_Text">source .venv/bin/activate</text:span></text:p>
        <text:p text:style-name="P2"><text:span text:style-name="Source_20_Text">uvicorn app.main:app --reload</text:span></text:p>
      </text:section>
      <text:p text:style-name="Text_20_body">Verify:</text:p>
      <text:section text:style-name="Sect1" text:name="Section1">
        <text:p text:style-name="P3"><text:bookmark text:name="code-block-viewer"/><text:span text:style-name="Source_20_Text">curl http://127.0.0.1:8000</text:span></text:p>
      </text:section>
      <text:p text:style-name="Text_20_body">Expected:</text:p>
      <text:section text:style-name="Sect1" text:name="Section2">
        <text:p text:style-name="P3"><text:bookmark text:name="code-block-viewer Copy 1"/><text:span text:style-name="Source_20_Text">{"platform":"OSEP","organization":"MechXcel OSS","status":"running"}</text:span></text:p>
      </text:section>
      <text:p text:style-name="Horizontal_20_Line"/>
      <text:h text:style-name="Heading_20_2" text:outline-level="2">Terminal 2 - Frontend</text:h>
      <text:section text:style-name="Sect1" text:name="Section3">
        <text:p text:style-name="P1"><text:bookmark text:name="code-block-viewer Copy 2"/><text:span text:style-name="Source_20_Text">cd ~/projects/OSEP/frontend</text:span></text:p>
        <text:p text:style-name="P2"><text:span text:style-name="Source_20_Text">npm run dev</text:span></text:p>
      </text:section>
      <text:p text:style-name="Text_20_body">Open:</text:p>
      <text:section text:style-name="Sect1" text:name="Section4">
        <text:p text:style-name="P3"><text:bookmark text:name="code-block-viewer Copy 3"/><text:span text:style-name="Source_20_Text">http://localhost:5173</text:span></text:p>
      </text:section>
      <text:p text:style-name="Horizontal_20_Line"/>
      <text:h text:style-name="Heading_20_2" text:outline-level="2">Terminal 3 - Quick API Checks</text:h>
      <text:p text:style-name="Text_20_body">Check backend:</text:p>
      <text:section text:style-name="Sect1" text:name="Section5">
        <text:p text:style-name="P3"><text:bookmark text:name="code-block-viewer Copy 4"/><text:span text:style-name="Source_20_Text">curl http://127.0.0.1:8000/components</text:span></text:p>
      </text:section>
      <text:p text:style-name="Text_20_body">Expected:</text:p>
      <text:section text:style-name="Sect1" text:name="Section6">
        <text:p text:style-name="P3"><text:bookmark text:name="code-block-viewer Copy 5"/><text:span text:style-name="Source_20_Text">["cylinder","head"]</text:span></text:p>
      </text:section>
      <text:p text:style-name="Text_20_body">Check active project:</text:p>
      <text:section text:style-name="Sect1" text:name="Section7">
        <text:p text:style-name="P3"><text:bookmark text:name="code-block-viewer Copy 6"/><text:span text:style-name="Source_20_Text">curl http://127.0.0.1:8000/projects/active</text:span></text:p>
      </text:section>
      <text:p text:style-name="Horizontal_20_Line"/>
      <text:h text:style-name="Heading_20_2" text:outline-level="2">If Frontend Changes Are Not Reflected</text:h>
      <text:p text:style-name="Text_20_body">Backend:</text:p>
      <text:section text:style-name="Sect1" text:name="Section8">
        <text:p text:style-name="P1"><text:bookmark text:name="code-block-viewer Copy 7"/><text:span text:style-name="Source_20_Text">CTRL+C</text:span></text:p>
        <text:p text:style-name="P2"><text:span text:style-name="Source_20_Text">uvicorn app.main:app --reload</text:span></text:p>
      </text:section>
      <text:p text:style-name="Text_20_body">Frontend:</text:p>
      <text:section text:style-name="Sect1" text:name="Section9">
        <text:p text:style-name="P1"><text:bookmark text:name="code-block-viewer Copy 8"/><text:span text:style-name="Source_20_Text">CTRL+C</text:span></text:p>
        <text:p text:style-name="P2"><text:span text:style-name="Source_20_Text">npm run dev</text:span></text:p>
      </text:section>
      <text:p text:style-name="Text_20_body">Browser:</text:p>
      <text:section text:style-name="Sect1" text:name="Section10">
        <text:p text:style-name="P3"><text:bookmark text:name="code-block-viewer Copy 9"/><text:soft-page-break/><text:span text:style-name="Source_20_Text">Ctrl+Shift+R</text:span></text:p>
      </text:section>
      <text:p text:style-name="Text_20_body">(Hard refresh)</text:p>
      <text:p text:style-name="Horizontal_20_Line"/>
      <text:h text:style-name="Heading_20_2" text:outline-level="2">Check Open Ports</text:h>
      <text:section text:style-name="Sect1" text:name="Section11">
        <text:p text:style-name="P1"><text:bookmark text:name="code-block-viewer Copy 10"/><text:span text:style-name="Source_20_Text">ss -tlnp | grep 8000</text:span></text:p>
        <text:p text:style-name="P2"><text:span text:style-name="Source_20_Text">ss -tlnp | grep 5173</text:span></text:p>
      </text:section>
      <text:p text:style-name="Text_20_body">Expected:</text:p>
      <text:section text:style-name="Sect1" text:name="Section12">
        <text:p text:style-name="P1"><text:bookmark text:name="code-block-viewer Copy 11"/><text:span text:style-name="Source_20_Text">127.0.0.1:8000</text:span></text:p>
        <text:p text:style-name="P2"><text:span text:style-name="Source_20_Text">127.0.0.1:5173</text:span></text:p>
      </text:section>
      <text:p text:style-name="Horizontal_20_Line"/>
      <text:h text:style-name="Heading_20_2" text:outline-level="2">One-Liner Backend Startup</text:h>
      <text:section text:style-name="Sect1" text:name="Section16">
        <text:p text:style-name="P3"><text:bookmark text:name="code-block-viewer Copy 15"/><text:span text:style-name="Source_20_Text">cd ~/projects/OSEP/backend &amp;&amp; source .venv/bin/activate &amp;&amp; uvicorn app.main:app --reload</text:span></text:p>
      </text:section>
      <text:h text:style-name="Heading_20_2" text:outline-level="2">One-Liner Frontend Startup</text:h>
      <text:section text:style-name="Sect1" text:name="Section17">
        <text:p text:style-name="P3"><text:bookmark text:name="code-block-viewer Copy 16"/><text:span text:style-name="Source_20_Text">cd ~/projects/OSEP/frontend &amp;&amp; npm run dev</text:span></text:p>
      </text:section>
      <text:p text:style-name="Text_20_body">That's all you need after every reboo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8:26:00.724776407</meta:creation-date>
    <dc:date>2026-05-30T19:34:39.677051101</dc:date>
    <meta:editing-duration>PT1M59S</meta:editing-duration>
    <meta:editing-cycles>2</meta:editing-cycles>
    <meta:generator>LibreOffice/26.2.2.2$Linux_X86_64 LibreOffice_project/620$Build-2</meta:generator>
    <meta:document-statistic meta:table-count="0" meta:image-count="0" meta:object-count="0" meta:page-count="2" meta:paragraph-count="41" meta:word-count="112" meta:character-count="919" meta:non-whitespace-character-count="851"/>
  </office:meta>
</office:document-meta>
</file>